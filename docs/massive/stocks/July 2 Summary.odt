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the clean summary of what we did today.</text:p>
      <text:h text:style-name="Heading_20_2" text:outline-level="2">1. We cleaned up the live scanner workflow</text:h>
      <text:p text:style-name="Text_20_body">We built a final daily scanner pipeline that now does this:</text:p>
      <text:section text:style-name="Sect1" text:name="code-block-viewer">
        <text:p text:style-name="P1"><text:span text:style-name="Source_20_Text">confirmed scanner rows</text:span></text:p>
        <text:p text:style-name="Preformatted_20_Text"><text:span text:style-name="Source_20_Text">→ Massive fundamentals enrichment</text:span></text:p>
        <text:p text:style-name="Preformatted_20_Text"><text:span text:style-name="Source_20_Text">→ float / short-interest / short-volume risk labels</text:span></text:p>
        <text:p text:style-name="Preformatted_20_Text"><text:span text:style-name="Source_20_Text">→ validated high-price setup labels</text:span></text:p>
        <text:p text:style-name="P2"><text:span text:style-name="Source_20_Text">→ final scanner view</text:span></text:p>
      </text:section>
      <text:p text:style-name="Text_20_body">The final daily file is:</text:p>
      <text:section text:style-name="Sect1" text:name="Section1">
        <text:p text:style-name="P3"><text:bookmark text:name="code-block-viewer"/><text:span text:style-name="Source_20_Text">data/reference/stocks/today_final_scanner_view_latest.csv</text:span></text:p>
      </text:section>
      <text:p text:style-name="Text_20_body">And the daily runner is:</text:p>
      <text:section text:style-name="Sect1" text:name="Section2">
        <text:p text:style-name="P3"><text:bookmark text:name="code-block-viewer Copy 1"/><text:span text:style-name="Source_20_Text">uv run python scripts/stocks/run_today_final_scanner_pipeline.py</text:span></text:p>
      </text:section>
      <text:p text:style-name="Text_20_body">The final scanner correctly showed <text:span text:style-name="Strong_20_Emphasis">0 validated high-price trades today</text:span>, because all current tickers were under <text:span text:style-name="Source_20_Text">$50</text:span>. It also separated four risky names into <text:span text:style-name="Source_20_Text">WATCH_ONLY_CHAOS_RISK</text:span>: <text:span text:style-name="Source_20_Text">GVH</text:span>, <text:span text:style-name="Source_20_Text">DOMH</text:span>, <text:span text:style-name="Source_20_Text">DUKR</text:span>, and <text:span text:style-name="Source_20_Text">RGS</text:span>. </text:p>
      <text:h text:style-name="Heading_20_2" text:outline-level="2">2. We added the fundamentals/risk layer</text:h>
      <text:p text:style-name="Text_20_body">Your Massive plan supports:</text:p>
      <text:section text:style-name="Sect1" text:name="Section3">
        <text:p text:style-name="P1"><text:bookmark text:name="code-block-viewer Copy 2"/><text:span text:style-name="Source_20_Text">float</text:span></text:p>
        <text:p text:style-name="Preformatted_20_Text"><text:span text:style-name="Source_20_Text">short interest</text:span></text:p>
        <text:p text:style-name="P2"><text:span text:style-name="Source_20_Text">short volume</text:span></text:p>
      </text:section>
      <text:p text:style-name="Text_20_body">It does <text:span text:style-name="Strong_20_Emphasis">not</text:span> currently support ratios, balance sheet, or income statement endpoints, so those return <text:span text:style-name="Source_20_Text">403</text:span>, which is expected.</text:p>
      <text:p text:style-name="Text_20_body">We added risk labels like:</text:p>
      <text:section text:style-name="Sect1" text:name="Section4">
        <text:p text:style-name="P1"><text:bookmark text:name="code-block-viewer Copy 3"/><text:span text:style-name="Source_20_Text">TINY_FLOAT</text:span></text:p>
        <text:p text:style-name="Preformatted_20_Text"><text:span text:style-name="Source_20_Text">LOW_FLOAT</text:span></text:p>
        <text:p text:style-name="Preformatted_20_Text"><text:span text:style-name="Source_20_Text">MICRO_FREE_FLOAT_MCAP</text:span></text:p>
        <text:p text:style-name="Preformatted_20_Text"><text:span text:style-name="Source_20_Text">PRE_MARKET_VOLUME_2X_FLOAT</text:span></text:p>
        <text:p text:style-name="Preformatted_20_Text"><text:span text:style-name="Source_20_Text">FIRST15_VOLUME_GT_10PCT_FLOAT</text:span></text:p>
        <text:p text:style-name="Preformatted_20_Text"><text:span text:style-name="Source_20_Text">SHORT_INTEREST_GT_20PCT_FLOAT</text:span></text:p>
        <text:p text:style-name="Preformatted_20_Text"><text:span text:style-name="Source_20_Text">SHORT_VOLUME_GT_50PCT</text:span></text:p>
        <text:p text:style-name="P2"><text:span text:style-name="Source_20_Text">DAYS_TO_COVER_GT_3</text:span></text:p>
      </text:section>
      <text:p text:style-name="Text_20_body">The important result: the scanner now knows the difference between:</text:p>
      <text:section text:style-name="Sect1" text:name="Section5">
        <text:p text:style-name="P1"><text:bookmark text:name="code-block-viewer Copy 4"/><text:span text:style-name="Source_20_Text">valid setup</text:span></text:p>
        <text:p text:style-name="Preformatted_20_Text"><text:span text:style-name="Source_20_Text">vs.</text:span></text:p>
        <text:p text:style-name="Preformatted_20_Text"><text:span text:style-name="Source_20_Text">dangerous chaos name</text:span></text:p>
        <text:p text:style-name="Preformatted_20_Text"><text:span text:style-name="Source_20_Text">vs.</text:span></text:p>
        <text:p text:style-name="P2"><text:span text:style-name="Source_20_Text">normal no-trade name</text:span></text:p>
      </text:section>
      <text:p text:style-name="Text_20_body"><text:soft-page-break/>That is a big improvement.</text:p>
      <text:h text:style-name="Heading_20_2" text:outline-level="2">3. We confirmed the best high-price setup</text:h>
      <text:p text:style-name="Text_20_body">The strongest validated setup remains:</text:p>
      <text:section text:style-name="Sect1" text:name="Section6">
        <text:p text:style-name="P3"><text:bookmark text:name="code-block-viewer Copy 5"/><text:span text:style-name="Source_20_Text">LONG_quiet_pre_market_first15_strong</text:span></text:p>
      </text:section>
      <text:p text:style-name="Text_20_body">Base historical rule:</text:p>
      <text:section text:style-name="Sect1" text:name="Section7">
        <text:p text:style-name="P1"><text:bookmark text:name="code-block-viewer Copy 6"/><text:span text:style-name="Source_20_Text">prev_close &gt;= 50</text:span></text:p>
        <text:p text:style-name="Preformatted_20_Text"><text:span text:style-name="Source_20_Text">pre-market dollar RVOL &lt;= 0.1</text:span></text:p>
        <text:p text:style-name="Preformatted_20_Text"><text:span text:style-name="Source_20_Text">first15 dollar RVOL &gt;= 0.01</text:span></text:p>
        <text:p text:style-name="P2"><text:span text:style-name="Source_20_Text">first15 return &gt;= 1%</text:span></text:p>
      </text:section>
      <text:p text:style-name="Text_20_body">The original validated exit was:</text:p>
      <text:section text:style-name="Sect1" text:name="Section8">
        <text:p text:style-name="P1"><text:bookmark text:name="code-block-viewer Copy 7"/><text:span text:style-name="Source_20_Text">target 2.0%</text:span></text:p>
        <text:p text:style-name="P2"><text:span text:style-name="Source_20_Text">stop 3.0%</text:span></text:p>
      </text:section>
      <text:p text:style-name="Text_20_body">It had a large sample and passed train/test stability.</text:p>
      <text:h text:style-name="Heading_20_2" text:outline-level="2">4. We found better filters for that setup</text:h>
      <text:p text:style-name="Text_20_body">The bucket test showed the setup is strongest when the first 15 minutes are strong but not insane.</text:p>
      <text:p text:style-name="Text_20_body">Bad buckets to avoid:</text:p>
      <text:section text:style-name="Sect1" text:name="Section9">
        <text:p text:style-name="P1"><text:bookmark text:name="code-block-viewer Copy 8"/><text:span text:style-name="Source_20_Text">gap down &gt; 2%</text:span></text:p>
        <text:p text:style-name="Preformatted_20_Text"><text:span text:style-name="Source_20_Text">gap 10%+</text:span></text:p>
        <text:p text:style-name="Preformatted_20_Text"><text:span text:style-name="Source_20_Text">first15 return 8%+</text:span></text:p>
        <text:p text:style-name="Preformatted_20_Text"><text:span text:style-name="Source_20_Text">first15 dollar RVOL 1.0+</text:span></text:p>
        <text:p text:style-name="P2"><text:span text:style-name="Source_20_Text">first15 range 8%+</text:span></text:p>
      </text:section>
      <text:p text:style-name="Text_20_body">The best refined filters became:</text:p>
      <text:h text:style-name="Heading_20_3" text:outline-level="3">A setup — looser quality</text:h>
      <text:section text:style-name="Sect1" text:name="Section10">
        <text:p text:style-name="P1"><text:bookmark text:name="code-block-viewer Copy 9"/><text:span text:style-name="Source_20_Text">gap_pct &gt;= 0 and &lt; 10</text:span></text:p>
        <text:p text:style-name="Preformatted_20_Text"><text:span text:style-name="Source_20_Text">first15 dollar RVOL &gt;= 0.05 and &lt; 1.0</text:span></text:p>
        <text:p text:style-name="Preformatted_20_Text"><text:span text:style-name="Source_20_Text">first15 return &gt;= 1 and &lt; 8</text:span></text:p>
        <text:p text:style-name="P2"><text:span text:style-name="Source_20_Text">first15 range &gt;= 2 and &lt; 8</text:span></text:p>
      </text:section>
      <text:h text:style-name="Heading_20_3" text:outline-level="3">A+ setup — moderate quality</text:h>
      <text:section text:style-name="Sect1" text:name="Section11">
        <text:p text:style-name="P1"><text:bookmark text:name="code-block-viewer Copy 10"/><text:span text:style-name="Source_20_Text">gap_pct &gt;= 0 and &lt; 10</text:span></text:p>
        <text:p text:style-name="Preformatted_20_Text"><text:span text:style-name="Source_20_Text">first15 dollar RVOL &gt;= 0.05 and &lt; 0.5</text:span></text:p>
        <text:p text:style-name="Preformatted_20_Text"><text:span text:style-name="Source_20_Text">first15 return &gt;= 2 and &lt; 8</text:span></text:p>
        <text:p text:style-name="P2"><text:span text:style-name="Source_20_Text">first15 range &gt;= 2 and &lt; 8</text:span></text:p>
      </text:section>
      <text:p text:style-name="Text_20_body">These held up very well in train/test:</text:p>
      <text:section text:style-name="Sect1" text:name="Section12">
        <text:p text:style-name="P1"><text:bookmark text:name="code-block-viewer Copy 11"/><text:span text:style-name="Source_20_Text">A setup:</text:span></text:p>
        <text:p text:style-name="Preformatted_20_Text"><text:span text:style-name="Source_20_Text">ALL <text:s text:c="2"/>avg net +0.4837%, win rate 68.22%</text:span></text:p>
        <text:p text:style-name="Preformatted_20_Text"><text:soft-page-break/><text:span text:style-name="Source_20_Text">TEST <text:s/>avg net +0.5130%, win rate 69.27%</text:span></text:p>
        <text:p text:style-name="Preformatted_20_Text"><text:span text:style-name="Source_20_Text">A+ setup:</text:span></text:p>
        <text:p text:style-name="Preformatted_20_Text"><text:span text:style-name="Source_20_Text">ALL <text:s text:c="2"/>avg net +0.5449%, win rate 69.86%</text:span></text:p>
        <text:p text:style-name="P2"><text:span text:style-name="Source_20_Text">TEST <text:s/>avg net +0.5635%, win rate 70.50%</text:span></text:p>
      </text:section>
      <text:p text:style-name="Text_20_body">That is a strong improvement over the baseline.</text:p>
      <text:h text:style-name="Heading_20_2" text:outline-level="2">5. We re-tested target/stop for the filtered setup</text:h>
      <text:p text:style-name="Text_20_body">The original <text:span text:style-name="Source_20_Text">2.0 / 3.0</text:span> exit is good, but the filtered setup supports a better practical exit.</text:p>
      <text:p text:style-name="Text_20_body">For <text:span text:style-name="Strong_20_Emphasis">A quality</text:span>:</text:p>
      <text:section text:style-name="Sect1" text:name="Section13">
        <text:p text:style-name="P1"><text:bookmark text:name="code-block-viewer Copy 12"/><text:span text:style-name="Source_20_Text">2.0 target / 3.0 stop:</text:span></text:p>
        <text:p text:style-name="Preformatted_20_Text"><text:span text:style-name="Source_20_Text">avg net +0.4837%</text:span></text:p>
        <text:p text:style-name="Preformatted_20_Text"><text:span text:style-name="Source_20_Text">win rate 68.22%</text:span></text:p>
        <text:p text:style-name="Preformatted_20_Text"><text:span text:style-name="Source_20_Text">2.5 target / 3.0 stop:</text:span></text:p>
        <text:p text:style-name="Preformatted_20_Text"><text:span text:style-name="Source_20_Text">avg net +0.6009%</text:span></text:p>
        <text:p text:style-name="Preformatted_20_Text"><text:span text:style-name="Source_20_Text">win rate 65.25%</text:span></text:p>
        <text:p text:style-name="Preformatted_20_Text"><text:span text:style-name="Source_20_Text">3.0 target / 4.0 stop:</text:span></text:p>
        <text:p text:style-name="Preformatted_20_Text"><text:span text:style-name="Source_20_Text">avg net +0.7265%</text:span></text:p>
        <text:p text:style-name="P2"><text:span text:style-name="Source_20_Text">win rate 65.34%</text:span></text:p>
      </text:section>
      <text:p text:style-name="Text_20_body">For <text:span text:style-name="Strong_20_Emphasis">A+ quality</text:span>:</text:p>
      <text:section text:style-name="Sect1" text:name="Section14">
        <text:p text:style-name="P1"><text:bookmark text:name="code-block-viewer Copy 13"/><text:span text:style-name="Source_20_Text">2.0 target / 3.0 stop:</text:span></text:p>
        <text:p text:style-name="Preformatted_20_Text"><text:span text:style-name="Source_20_Text">avg net +0.5449%</text:span></text:p>
        <text:p text:style-name="Preformatted_20_Text"><text:span text:style-name="Source_20_Text">win rate 69.86%</text:span></text:p>
        <text:p text:style-name="Preformatted_20_Text"><text:span text:style-name="Source_20_Text">2.5 target / 3.0 stop:</text:span></text:p>
        <text:p text:style-name="Preformatted_20_Text"><text:span text:style-name="Source_20_Text">avg net +0.6728%</text:span></text:p>
        <text:p text:style-name="Preformatted_20_Text"><text:span text:style-name="Source_20_Text">win rate 66.65%</text:span></text:p>
        <text:p text:style-name="Preformatted_20_Text"><text:span text:style-name="Source_20_Text">3.0 target / 4.0 stop:</text:span></text:p>
        <text:p text:style-name="Preformatted_20_Text"><text:span text:style-name="Source_20_Text">avg net +0.8252%</text:span></text:p>
        <text:p text:style-name="P2"><text:span text:style-name="Source_20_Text">win rate 66.98%</text:span></text:p>
      </text:section>
      <text:p text:style-name="Text_20_body">Best practical conclusion:</text:p>
      <text:section text:style-name="Sect1" text:name="Section15">
        <text:p text:style-name="P1"><text:bookmark text:name="code-block-viewer Copy 14"/><text:span text:style-name="Source_20_Text">Default exit: 2.5 target / 3.0 stop</text:span></text:p>
        <text:p text:style-name="P2"><text:span text:style-name="Source_20_Text">Aggressive exit: 3.0 target / 4.0 stop</text:span></text:p>
      </text:section>
      <text:p text:style-name="Text_20_body">I would <text:span text:style-name="Strong_20_Emphasis">not</text:span> make <text:span text:style-name="Source_20_Text">4.0 / 4.0</text:span> the default even though average net was high, because it has longer hold time and lower win rate. </text:p>
      <text:h text:style-name="Heading_20_2" text:outline-level="2">6. We briefly tested the trap idea, then correctly paused it</text:h>
      <text:p text:style-name="Text_20_body">We tested the idea of entering around pre-market high/low sweeps during the first 15 minutes.</text:p>
      <text:p text:style-name="Text_20_body">Important finding:</text:p>
      <text:section text:style-name="Sect1" text:name="Section16">
        <text:p text:style-name="P3"><text:bookmark text:name="code-block-viewer Copy 15"/><text:span text:style-name="Source_20_Text">The naive trap-entry version was not good enough.</text:span></text:p>
      </text:section>
      <text:p text:style-name="Text_20_body">It had positive medians in places, but negative average net, meaning the losers were too heavy. That does <text:span text:style-name="Strong_20_Emphasis">not</text:span> prove the trap idea is bad. It proves the simple version is too loose. It needs more filters, like fast reclaim/rejection, sweep depth, and avoiding real breakouts.</text:p>
      <text:p text:style-name="Text_20_body"><text:soft-page-break/>Good call to stop that branch and return to the main validated setup.</text:p>
      <text:h text:style-name="Heading_20_2" text:outline-level="2">Where we stand</text:h>
      <text:p text:style-name="Text_20_body">Today’s final result:</text:p>
      <text:section text:style-name="Sect1" text:name="Section17">
        <text:p text:style-name="P1"><text:bookmark text:name="code-block-viewer Copy 16"/><text:span text:style-name="Source_20_Text">Scanner pipeline: done</text:span></text:p>
        <text:p text:style-name="Preformatted_20_Text"><text:span text:style-name="Source_20_Text">Risk layer: done</text:span></text:p>
        <text:p text:style-name="Preformatted_20_Text"><text:span text:style-name="Source_20_Text">Validated high-price setup labels: done</text:span></text:p>
        <text:p text:style-name="Preformatted_20_Text"><text:span text:style-name="Source_20_Text">A / A+ quality filters: discovered and tested</text:span></text:p>
        <text:p text:style-name="Preformatted_20_Text"><text:span text:style-name="Source_20_Text">Target/stop re-test: done</text:span></text:p>
        <text:p text:style-name="P2"><text:span text:style-name="Source_20_Text">Best practical exit found: 2.5 / 3.0</text:span></text:p>
      </text:section>
      <text:p text:style-name="Text_20_body">Tomorrow’s first task is simple:</text:p>
      <text:section text:style-name="Sect1" text:name="Section18">
        <text:p text:style-name="P3"><text:bookmark text:name="code-block-viewer Copy 17"/><text:span text:style-name="Source_20_Text">Patch the live scanner so A and A+ use target 2.5 / stop 3.0 instead of 2.0 / 3.0.</text:span></text:p>
      </text:section>
      <text:p text:style-name="Text_20_body">Then we can call this high-price long scanner version 1 complet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2T23:24:21.240640023</meta:creation-date>
    <dc:date>2026-07-02T23:25:03.745412026</dc:date>
    <meta:editing-duration>PT44S</meta:editing-duration>
    <meta:editing-cycles>1</meta:editing-cycles>
    <meta:document-statistic meta:table-count="0" meta:image-count="0" meta:object-count="0" meta:page-count="4" meta:paragraph-count="117" meta:word-count="686" meta:character-count="4052" meta:non-whitespace-character-count="3473"/>
    <meta:generator>LibreOffice/26.2.4.2$Linux_X86_64 LibreOffice_project/620$Build-2</meta:generator>
  </office:meta>
</office:document-meta>
</file>