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3.6654in"/>
    </style:style>
    <style:style style:name="co6" style:family="table-column">
      <style:table-column-properties fo:break-before="auto" style:column-width="5.7134in"/>
    </style:style>
    <style:style style:name="co7" style:family="table-column">
      <style:table-column-properties fo:break-before="auto" style:column-width="4.9429in"/>
    </style:style>
    <style:style style:name="co8" style:family="table-column">
      <style:table-column-properties fo:break-before="auto" style:column-width="13.5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MBO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ce10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9" table:number-columns-repeated="16375"/>
        <table:table-row table:style-name="ro1">
          <table:table-cell table:style-name="ce1" office:value-type="string" calcext:value-type="string">
            <text:p>step_number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cript_nam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rgs</text:p>
          </table:table-cell>
          <table:table-cell table:style-name="ce1" office:value-type="string" calcext:value-type="string">
            <text:p>example</text:p>
          </table:table-cell>
          <table:table-cell table:style-name="ce11"/>
          <table:table-cell table:style-name="Default"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stimate_data_cost</text:p>
          </table:table-cell>
          <table:table-cell table:style-name="ce4" office:value-type="string" calcext:value-type="string">
            <text:p>estimate data cost and size of file</text:p>
          </table:table-cell>
          <table:table-cell table:style-name="ce6" office:value-type="string" calcext:value-type="string">
            <text:p>scripts/research/</text:p>
          </table:table-cell>
          <table:table-cell table:style-name="ce6" office:value-type="string" calcext:value-type="string">
            <text:p>databento_futures_data_cost</text:p>
          </table:table-cell>
          <table:table-cell table:style-name="ce9" table:formula="of:=&quot;uv run python &quot; &amp; [.D2] &amp; [.E2] &amp; &quot;.py&quot;" office:value-type="string" office:string-value="uv run python scripts/research/databento_futures_data_cost.py" calcext:value-type="string">
            <text:p>uv run python scripts/research/databento_futures_data_cost.py</text:p>
          </table:table-cell>
          <table:table-cell table:style-name="ce2" table:formula="of:=&quot;--symbol; --schemas; --start-utc; --end-utc&quot;" office:value-type="string" office:string-value="--symbol; --schemas; --start-utc; --end-utc" calcext:value-type="string">
            <text:p>--symbol; --schemas; --start-utc; --end-utc</text:p>
          </table:table-cell>
          <table:table-cell table:style-name="ce2" table:formula="of:=[.F2] &amp; &quot; --symbol=ES.v.0 --schemas mbo --start-utc 2026-04-12T00:00:00Z --end-utc 2026-06-28T00:00:00Z&quot;" office:value-type="string" office:string-value="uv run python scripts/research/databento_futures_data_cost.py --symbol=ES.v.0 --schemas mbo --start-utc 2026-04-12T00:00:00Z --end-utc 2026-06-28T00:00:00Z" calcext:value-type="string">
            <text:p>uv run python scripts/research/databento_futures_data_cost.py --symbol=ES.v.0 --schemas mbo --start-utc 2026-04-12T00:00:00Z --end-utc 2026-06-28T00:00:00Z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ownload_weekly_chunk</text:p>
          </table:table-cell>
          <table:table-cell table:style-name="ce4" office:value-type="string" calcext:value-type="string">
            <text:p>download a whole week</text:p>
          </table:table-cell>
          <table:table-cell table:style-name="ce6" office:value-type="string" calcext:value-type="string">
            <text:p>scripts/research/</text:p>
          </table:table-cell>
          <table:table-cell table:style-name="ce6" office:value-type="string" calcext:value-type="string">
            <text:p>databento_futures_data_pull_mbo</text:p>
          </table:table-cell>
          <table:table-cell table:style-name="ce9" table:formula="of:=&quot;uv run python &quot; &amp; [.D3] &amp; [.E3] &amp; &quot;.py&quot;" office:value-type="string" office:string-value="uv run python scripts/research/databento_futures_data_pull_mbo.py" calcext:value-type="string">
            <text:p>uv run python scripts/research/databento_futures_data_pull_mbo.py</text:p>
          </table:table-cell>
          <table:table-cell table:style-name="ce2" table:formula="of:=&quot;--symbol; --start-utc; --end-utc&quot;" office:value-type="string" office:string-value="--symbol; --start-utc; --end-utc" calcext:value-type="string">
            <text:p>--symbol; --start-utc; --end-utc</text:p>
          </table:table-cell>
          <table:table-cell table:style-name="ce2" table:formula="of:=[.F3] &amp; &quot; --symbol=ES.v.0 --start-utc 2026-04-12T00:00:00Z --end-utc 2026-06-28T00:00:00Z&quot;" office:value-type="string" office:string-value="uv run python scripts/research/databento_futures_data_pull_mbo.py --symbol=ES.v.0 --start-utc 2026-04-12T00:00:00Z --end-utc 2026-06-28T00:00:00Z" calcext:value-type="string">
            <text:p>uv run python scripts/research/databento_futures_data_pull_mbo.py --symbol=ES.v.0 --start-utc 2026-04-12T00:00:00Z --end-utc 2026-06-28T00:00:00Z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aw_dbn_to_mbo_parquet_normalized</text:p>
          </table:table-cell>
          <table:table-cell table:style-name="ce4" office:value-type="string" calcext:value-type="string">
            <text:p>convert from raw dbn to parquet and normalize</text:p>
          </table:table-cell>
          <table:table-cell table:style-name="ce6" office:value-type="string" calcext:value-type="string">
            <text:p>scripts/research/</text:p>
          </table:table-cell>
          <table:table-cell table:style-name="ce6" office:value-type="string" calcext:value-type="string">
            <text:p>databento_futures_session_to_parquet_mbo</text:p>
          </table:table-cell>
          <table:table-cell table:style-name="ce9" table:formula="of:=&quot;uv run python &quot; &amp; [.D4] &amp; [.E4] &amp; &quot;.py&quot;" office:value-type="string" office:string-value="uv run python scripts/research/databento_futures_session_to_parquet_mbo.py" calcext:value-type="string">
            <text:p>uv run python scripts/research/databento_futures_session_to_parquet_mbo.py</text:p>
          </table:table-cell>
          <table:table-cell table:style-name="ce2" table:formula="of:=&quot;--symbol; --chunk-label&quot;" office:value-type="string" office:string-value="--symbol; --chunk-label" calcext:value-type="string">
            <text:p>--symbol; --chunk-label</text:p>
          </table:table-cell>
          <table:table-cell table:style-name="ce2" table:formula="of:=[.F4] &amp; &quot; --symbol=ES.v.0 --chunk-label 2026-06-28_2026-07-05&quot;" office:value-type="string" office:string-value="uv run python scripts/research/databento_futures_session_to_parquet_mbo.py --symbol=ES.v.0 --chunk-label 2026-06-28_2026-07-05" calcext:value-type="string">
            <text:p>uv run python scripts/research/databento_futures_session_to_parquet_mbo.py --symbol=ES.v.0 --chunk-label 2026-06-28_2026-07-05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BO_TO_BBO_CLEANED</text:p>
          </table:table-cell>
          <table:table-cell table:style-name="ce4" office:value-type="string" calcext:value-type="string">
            <text:p>removed crossed quotes</text:p>
          </table:table-cell>
          <table:table-cell table:style-name="ce6" office:value-type="string" calcext:value-type="string">
            <text:p>scripts/research/</text:p>
          </table:table-cell>
          <table:table-cell table:style-name="ce6" office:value-type="string" calcext:value-type="string">
            <text:p>databento_futures_mbo_to_bbo</text:p>
          </table:table-cell>
          <table:table-cell table:style-name="ce9" table:formula="of:=&quot;uv run python &quot; &amp; [.D5] &amp; [.E5] &amp; &quot;.py&quot;" office:value-type="string" office:string-value="uv run python scripts/research/databento_futures_mbo_to_bbo.py" calcext:value-type="string">
            <text:p>uv run python scripts/research/databento_futures_mbo_to_bbo.py</text:p>
          </table:table-cell>
          <table:table-cell table:style-name="ce2" table:formula="of:=&quot;--symbol; --chunk-label; --overwrite&quot;" office:value-type="string" office:string-value="--symbol; --chunk-label; --overwrite" calcext:value-type="string">
            <text:p>--symbol; --chunk-label; --overwrite</text:p>
          </table:table-cell>
          <table:table-cell table:style-name="ce2" table:formula="of:=[.F5] &amp; &quot; --symbol=ES.v.0 --chunk-label=2026-06-28 --overwrite&quot;" office:value-type="string" office:string-value="uv run python scripts/research/databento_futures_mbo_to_bbo.py --symbol=ES.v.0 --chunk-label=2026-06-28 --overwrite" calcext:value-type="string">
            <text:p>uv run python scripts/research/databento_futures_mbo_to_bbo.py --symbol=ES.v.0 --chunk-label=2026-06-28 --overwrite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_minute_bars</text:p>
          </table:table-cell>
          <table:table-cell table:style-name="ce4" office:value-type="string" calcext:value-type="string">
            <text:p>create 1 minute bars</text:p>
          </table:table-cell>
          <table:table-cell table:style-name="ce6" office:value-type="string" calcext:value-type="string">
            <text:p>scripts/research/</text:p>
          </table:table-cell>
          <table:table-cell table:style-name="ce6" office:value-type="string" calcext:value-type="string">
            <text:p>databento_futures_session_quote_1m_bars_mbo</text:p>
          </table:table-cell>
          <table:table-cell table:style-name="ce9" table:formula="of:=&quot;uv run python &quot; &amp; [.D6] &amp; [.E6] &amp; &quot;.py&quot;" office:value-type="string" office:string-value="uv run python scripts/research/databento_futures_session_quote_1m_bars_mbo.py" calcext:value-type="string">
            <text:p>uv run python scripts/research/databento_futures_session_quote_1m_bars_mbo.py</text:p>
          </table:table-cell>
          <table:table-cell table:style-name="ce2" table:formula="of:=&quot;--symbol; --chunk-label; --overwrite&quot;" office:value-type="string" office:string-value="--symbol; --chunk-label; --overwrite" calcext:value-type="string">
            <text:p>--symbol; --chunk-label; --overwrite</text:p>
          </table:table-cell>
          <table:table-cell table:style-name="ce2" table:formula="of:=[.F6] &amp; &quot; --symbol=ES.v.0 --chunk-label=2026-06-28 --overwrite&quot;" office:value-type="string" office:string-value="uv run python scripts/research/databento_futures_session_quote_1m_bars_mbo.py --symbol=ES.v.0 --chunk-label=2026-06-28 --overwrite" calcext:value-type="string">
            <text:p>uv run python scripts/research/databento_futures_session_quote_1m_bars_mbo.py --symbol=ES.v.0 --chunk-label=2026-06-28 --overwrite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essionize</text:p>
          </table:table-cell>
          <table:table-cell office:value-type="string" calcext:value-type="string">
            <text:p>create sessions</text:p>
          </table:table-cell>
          <table:table-cell table:style-name="ce6" office:value-type="string" calcext:value-type="string">
            <text:p>scripts/research/</text:p>
          </table:table-cell>
          <table:table-cell table:style-name="ce7" office:value-type="string" calcext:value-type="string">
            <text:p>databento_futures_mbo_quote_1m_sessionize</text:p>
          </table:table-cell>
          <table:table-cell table:style-name="ce9" table:formula="of:=&quot;uv run python &quot; &amp; [.D7] &amp; [.E7] &amp; &quot;.py&quot;" office:value-type="string" office:string-value="uv run python scripts/research/databento_futures_mbo_quote_1m_sessionize.py" calcext:value-type="string">
            <text:p>uv run python scripts/research/databento_futures_mbo_quote_1m_sessionize.py</text:p>
          </table:table-cell>
          <table:table-cell table:style-name="ce2" table:formula="of:=&quot;--symbol; --chunk-label; --start-session-date; --end-session-date; --overwrite&quot;" office:value-type="string" office:string-value="--symbol; --chunk-label; --start-session-date; --end-session-date; --overwrite" calcext:value-type="string">
            <text:p>--symbol; --chunk-label; --start-session-date; --end-session-date; --overwrite</text:p>
          </table:table-cell>
          <table:table-cell table:style-name="ce2" table:formula="of:=[.F7] &amp; &quot; --symbol=ES.v.0 --chunk-label 2026-06-21_2026-06-28 --start-session-date 2026-06-22 --end-session-date 2026-06-26 --overwrite&quot;" office:value-type="string" office:string-value="uv run python scripts/research/databento_futures_mbo_quote_1m_sessionize.py --symbol=ES.v.0 --chunk-label 2026-06-21_2026-06-28 --start-session-date 2026-06-22 --end-session-date 2026-06-26 --overwrite" calcext:value-type="string">
            <text:p>uv run python scripts/research/databento_futures_mbo_quote_1m_sessionize.py --symbol=ES.v.0 --chunk-label 2026-06-21_2026-06-28 --start-session-date 2026-06-22 --end-session-date 2026-06-26 --overwrite</text:p>
          </table:table-cell>
          <table:table-cell/>
          <table:table-cell table:style-name="ce3"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create output folder with summary parquets and png charts for quick sanity check</text:p>
          </table:table-cell>
          <table:table-cell table:style-name="ce6" office:value-type="string" calcext:value-type="string">
            <text:p>scripts/research/</text:p>
          </table:table-cell>
          <table:table-cell office:value-type="string" calcext:value-type="string">
            <text:p>databento_futures_session_validate_quote_bars_mbo</text:p>
          </table:table-cell>
          <table:table-cell table:style-name="ce9" table:formula="of:=&quot;uv run python &quot; &amp; [.D8] &amp; [.E8] &amp; &quot;.py&quot;" office:value-type="string" office:string-value="uv run python scripts/research/databento_futures_session_validate_quote_bars_mbo.py" calcext:value-type="string">
            <text:p>uv run python scripts/research/databento_futures_session_validate_quote_bars_mbo.py</text:p>
          </table:table-cell>
          <table:table-cell office:value-type="string" calcext:value-type="string">
            <text:p>--symbol; --session-date</text:p>
          </table:table-cell>
          <table:table-cell table:number-columns-repeated="2"/>
          <table:table-cell table:style-name="ce3"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ch_pipeline</text:p>
          </table:table-cell>
          <table:table-cell office:value-type="string" calcext:value-type="string">
            <text:p>runs the batch pipeline</text:p>
          </table:table-cell>
          <table:table-cell table:style-name="ce6" office:value-type="string" calcext:value-type="string">
            <text:p>scripts/research/</text:p>
          </table:table-cell>
          <table:table-cell office:value-type="string" calcext:value-type="string">
            <text:p>databento_futures_mbo_batch_pipeline</text:p>
          </table:table-cell>
          <table:table-cell table:style-name="ce9" table:formula="of:=&quot;uv run python &quot; &amp; [.D9] &amp; [.E9] &amp; &quot;.py&quot;" office:value-type="string" office:string-value="uv run python scripts/research/databento_futures_mbo_batch_pipeline.py" calcext:value-type="string">
            <text:p>uv run python scripts/research/databento_futures_mbo_batch_pipeline.py</text:p>
          </table:table-cell>
          <table:table-cell office:value-type="string" calcext:value-type="string">
            <text:p>--symbol; --start-utc; --end-utc; --max-chunks; --status-interval</text:p>
          </table:table-cell>
          <table:table-cell table:number-columns-repeated="2"/>
          <table:table-cell table:style-name="ce3" table:number-columns-repeated="16375"/>
        </table:table-row>
        <table:table-row table:style-name="ro1" table:number-rows-repeated="1048566">
          <table:table-cell table:number-columns-repeated="9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8:22:54.704074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6:19:44.620150168</meta:creation-date>
    <meta:generator>LibreOffice/26.2.4.2$Linux_X86_64 LibreOffice_project/620$Build-2</meta:generator>
    <dc:date>2026-07-20T18:25:23.583366062</dc:date>
    <meta:editing-duration>PT38M51S</meta:editing-duration>
    <meta:editing-cycles>11</meta:editing-cycles>
    <meta:document-statistic meta:table-count="1" meta:cell-count="70" meta:object-count="0"/>
  </office:meta>
</office:document-meta>
</file>