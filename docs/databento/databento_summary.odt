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1ba6f2" officeooo:paragraph-rsid="001ba6f2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ba6f2" officeooo:paragraph-rsid="001ba6f2"/>
    </style:style>
    <style:style style:name="P3" style:family="paragraph" style:parent-style-name="Text_20_body">
      <style:text-properties fo:font-weight="bold" officeooo:rsid="002a822f" officeooo:paragraph-rsid="003a2110" style:font-weight-asian="bold" style:font-weight-complex="bold"/>
    </style:style>
    <style:style style:name="P4" style:family="paragraph" style:parent-style-name="Text_20_body">
      <style:text-properties officeooo:paragraph-rsid="003a2110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1ccea8" officeooo:paragraph-rsid="001ccea8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ba6f2" officeooo:paragraph-rsid="001ccea8"/>
    </style:style>
    <style:style style:name="P8" style:family="paragraph" style:parent-style-name="Standard">
      <style:text-properties officeooo:paragraph-rsid="001ccea8"/>
    </style:style>
    <style:style style:name="P9" style:family="paragraph" style:parent-style-name="Text_20_body">
      <style:text-properties officeooo:paragraph-rsid="001df3b2"/>
    </style:style>
    <style:style style:name="P10" style:family="paragraph" style:parent-style-name="Text_20_body">
      <style:text-properties fo:font-weight="bold" officeooo:rsid="002a822f" officeooo:paragraph-rsid="002d6524" style:font-weight-asian="bold" style:font-weight-complex="bold"/>
    </style:style>
    <style:style style:name="P11" style:family="paragraph" style:parent-style-name="Text_20_body">
      <style:text-properties officeooo:paragraph-rsid="001ccea8"/>
    </style:style>
    <style:style style:name="P12" style:family="paragraph" style:parent-style-name="Standard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1ccea8" officeooo:paragraph-rsid="001fcd39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ba6f2" officeooo:paragraph-rsid="001fcd39"/>
    </style:style>
    <style:style style:name="P14" style:family="paragraph" style:parent-style-name="Standard">
      <style:text-properties officeooo:paragraph-rsid="001fcd39"/>
    </style:style>
    <style:style style:name="P15" style:family="paragraph" style:parent-style-name="Text_20_body">
      <style:text-properties officeooo:paragraph-rsid="002d6524"/>
    </style:style>
    <style:style style:name="P16" style:family="paragraph" style:parent-style-name="Standard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226037" officeooo:paragraph-rsid="00226037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ba6f2" officeooo:paragraph-rsid="00226037"/>
    </style:style>
    <style:style style:name="P18" style:family="paragraph" style:parent-style-name="Standard">
      <style:text-properties officeooo:paragraph-rsid="00301c1d"/>
    </style:style>
    <style:style style:name="P19" style:family="paragraph" style:parent-style-name="Text_20_body">
      <style:text-properties officeooo:paragraph-rsid="00301c1d"/>
    </style:style>
    <style:style style:name="P20" style:family="paragraph" style:parent-style-name="Text_20_body">
      <style:text-properties fo:font-weight="bold" officeooo:rsid="002a822f" officeooo:paragraph-rsid="00309a5a" style:font-weight-asian="bold" style:font-weight-complex="bold"/>
    </style:style>
    <style:style style:name="P21" style:family="paragraph" style:parent-style-name="Standard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226037" officeooo:paragraph-rsid="002430fd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1ba6f2" officeooo:paragraph-rsid="002430fd"/>
    </style:style>
    <style:style style:name="P23" style:family="paragraph" style:parent-style-name="Standard">
      <style:text-properties officeooo:paragraph-rsid="002430fd"/>
    </style:style>
    <style:style style:name="P24" style:family="paragraph" style:parent-style-name="Text_20_body">
      <style:text-properties officeooo:paragraph-rsid="00334f61"/>
    </style:style>
    <style:style style:name="P25" style:family="paragraph" style:parent-style-name="Text_20_body">
      <style:text-properties fo:font-weight="bold" officeooo:rsid="002a822f" officeooo:paragraph-rsid="0033d6c2" style:font-weight-asian="bold" style:font-weight-complex="bold"/>
    </style:style>
    <style:style style:name="P26" style:family="paragraph" style:parent-style-name="Standard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226037" officeooo:paragraph-rsid="00273470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rsid="001ba6f2" officeooo:paragraph-rsid="00273470"/>
    </style:style>
    <style:style style:name="P28" style:family="paragraph" style:parent-style-name="Standard">
      <style:text-properties officeooo:paragraph-rsid="00273470"/>
    </style:style>
    <style:style style:name="P29" style:family="paragraph" style:parent-style-name="Text_20_body">
      <style:text-properties officeooo:paragraph-rsid="003571c4"/>
    </style:style>
    <style:style style:name="P30" style:family="paragraph" style:parent-style-name="Text_20_body">
      <style:text-properties fo:font-weight="bold" officeooo:rsid="002a822f" officeooo:paragraph-rsid="003734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2110" style:font-weight-asian="bold" style:font-weight-complex="bold"/>
    </style:style>
    <style:style style:name="T3" style:family="text">
      <style:text-properties fo:font-weight="bold" officeooo:rsid="001ba6f2" style:font-weight-asian="bold" style:font-weight-complex="bold"/>
    </style:style>
    <style:style style:name="T4" style:family="text">
      <style:text-properties officeooo:rsid="001ba6f2"/>
    </style:style>
    <style:style style:name="T5" style:family="text">
      <style:text-properties officeooo:rsid="002c7539"/>
    </style:style>
    <style:style style:name="T6" style:family="text">
      <style:text-properties officeooo:rsid="001fcd39"/>
    </style:style>
    <style:style style:name="T7" style:family="text">
      <style:text-properties fo:font-weight="bold" officeooo:rsid="002d6524" style:font-weight-asian="bold" style:font-weight-complex="bold"/>
    </style:style>
    <style:style style:name="T8" style:family="text">
      <style:text-properties officeooo:rsid="0025e8d5"/>
    </style:style>
    <style:style style:name="T9" style:family="text">
      <style:text-properties officeooo:rsid="002430fd"/>
    </style:style>
    <style:style style:name="T10" style:family="text">
      <style:text-properties officeooo:rsid="003265bb"/>
    </style:style>
    <style:style style:name="T11" style:family="text">
      <style:text-properties officeooo:rsid="0028536d"/>
    </style:style>
    <style:style style:name="T12" style:family="text">
      <style:text-properties officeooo:rsid="002734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mate data cost/size:</text:p>
      <text:p text:style-name="P2"/>
      <text:p text:style-name="P2"><text:span text:style-name="T1">Script</text:span>: databento_es_cost_check</text:p>
      <text:p text:style-name="P2"><text:span text:style-name="T1">Location</text:span>: scripts/research</text:p>
      <text:p text:style-name="Text_20_body"><text:span text:style-name="T1">Run Command:</text:span> uv run python scripts/research/<text:span text:style-name="T1">databento_es_cost_check.py</text:span></text:p>
      <text:p text:style-name="P3">Arguments: --symbol –session-date</text:p>
      <text:p text:style-name="P4"><text:span text:style-name="T2">example: </text:span>uv run python scripts/research/databento_es_cost_check.py <text:line-break/>--symbol ES.v.0 <text:line-break/>--session-date 2026-07-02</text:p>
      <text:p text:style-name="P5"/>
      <text:p text:style-name="P6">Download one day’s worth of data:</text:p>
      <text:p text:style-name="P7"/>
      <text:p text:style-name="P8"><text:span text:style-name="T3">Script</text:span><text:span text:style-name="T4">: <text:s/></text:span><text:span text:style-name="T1">databento_pull_mbp1_session</text:span></text:p>
      <text:p text:style-name="P7"><text:span text:style-name="T1">Location</text:span>: scripts/research</text:p>
      <text:p text:style-name="P9"><text:span text:style-name="T1">Run Command:</text:span> uv run python scripts/research/<text:span text:style-name="T1">databento_pull_mbp1_session</text:span></text:p>
      <text:p text:style-name="P10">Arguments: --symbol –session-date --<text:span text:style-name="T5">dry-run</text:span></text:p>
      <text:p text:style-name="P11"/>
      <text:p text:style-name="P12"><text:span text:style-name="T6">Normalize and convert raw data to parquet</text:span>:</text:p>
      <text:p text:style-name="P13"/>
      <text:p text:style-name="P14"><text:span text:style-name="T3">Script</text:span><text:span text:style-name="T4">: <text:s/></text:span><text:span text:style-name="T1">databento_mbp1_session_to_parquet</text:span></text:p>
      <text:p text:style-name="P13"><text:span text:style-name="T1">Location</text:span>: scripts/research</text:p>
      <text:p text:style-name="P15"><text:span text:style-name="T1">Run Command:</text:span> uv run python scripts/research/<text:span text:style-name="T1">databento_mbp1_session_to_parquet</text:span><text:span text:style-name="T1">.</text:span><text:span text:style-name="T7">py</text:span></text:p>
      <text:p text:style-name="P10">Arguments: --symbol –session-date</text:p>
      <text:p text:style-name="P10"/>
      <text:p text:style-name="P16">Create clean parquet file:</text:p>
      <text:p text:style-name="P17"/>
      <text:p text:style-name="P18"><text:span text:style-name="T3">Script</text:span><text:span text:style-name="T4">: <text:s/></text:span><text:span text:style-name="T3">databento_mbp1_session_clean</text:span></text:p>
      <text:p text:style-name="P17"><text:span text:style-name="T1">Location</text:span>: scripts/research</text:p>
      <text:p text:style-name="P19"><text:span text:style-name="T1">Run Command</text:span>: uv run python scripts/research/<text:span text:style-name="T1">databento_mbp1_session_clean</text:span>.py</text:p>
      <text:p text:style-name="P20">Arguments: --symbol –session-date</text:p>
      <text:p text:style-name="P20"/>
      <text:p text:style-name="P21">Create <text:span text:style-name="T8">1 </text:span><text:span text:style-name="T9">minute bars from </text:span><text:span text:style-name="T10">cleaned session</text:span><text:span text:style-name="T9"> file</text:span>:</text:p>
      <text:p text:style-name="P22"/>
      <text:p text:style-name="P23"><text:span text:style-name="T3">Script</text:span><text:span text:style-name="T4">: <text:s/></text:span>databento_mbp1_session_quote_1m_bars</text:p>
      <text:p text:style-name="P22"><text:span text:style-name="T1">Location</text:span>: scripts/research</text:p>
      <text:p text:style-name="P24"><text:span text:style-name="T1">Run Command</text:span>: uv run python scripts/research/databento_mbp1_session_quote_1m_bars.py</text:p>
      <text:p text:style-name="P25">Arguments: --symbol –session-date</text:p>
      <text:p text:style-name="P25"/>
      <text:p text:style-name="P26"><text:soft-page-break/></text:p>
      <text:p text:style-name="P26"/>
      <text:p text:style-name="P26"/>
      <text:p text:style-name="P26"/>
      <text:p text:style-name="P26"><text:span text:style-name="T11">Serving file sanity check</text:span><text:span text:style-name="T12"> script</text:span>:</text:p>
      <text:p text:style-name="P27"/>
      <text:p text:style-name="P28"><text:span text:style-name="T3">Script</text:span><text:span text:style-name="T4">: <text:s/></text:span><text:span text:style-name="T1">databento_mbp1_session_validate_quote_bars</text:span></text:p>
      <text:p text:style-name="P27"><text:span text:style-name="T1">Location</text:span>: scripts/research</text:p>
      <text:p text:style-name="P29"><text:span text:style-name="T1">Run Command</text:span>: uv run python scripts/research/<text:span text:style-name="T1">databento_mbp1_session_validate_quote_bars.py</text:span></text:p>
      <text:p text:style-name="P30">Arguments: --symbol –session-d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3:57:36.122234657</meta:creation-date>
    <meta:generator>LibreOffice/26.2.4.2$Linux_X86_64 LibreOffice_project/620$Build-2</meta:generator>
    <dc:date>2026-07-06T16:30:19.066677467</dc:date>
    <meta:editing-duration>PT2H22M2S</meta:editing-duration>
    <meta:editing-cycles>24</meta:editing-cycles>
    <meta:document-statistic meta:table-count="0" meta:image-count="0" meta:object-count="0" meta:page-count="2" meta:paragraph-count="31" meta:word-count="130" meta:character-count="1389" meta:non-whitespace-character-count="1292"/>
  </office:meta>
</office:document-meta>
</file>